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A000003CAD1AD40442C17CB66.png" manifest:media-type="image/png"/>
  <manifest:file-entry manifest:full-path="Pictures/1000000000000506000002BC6C4E50FAFF165E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1.091cm" style:rel-column-width="42756*"/>
    </style:style>
    <style:style style:name="Table1.B" style:family="table-column">
      <style:table-column-properties style:column-width="5.909cm" style:rel-column-width="22779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6pt" officeooo:rsid="0012e486" officeooo:paragraph-rsid="0012e486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officeooo:rsid="0012e486" officeooo:paragraph-rsid="0047a1a9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2e486" officeooo:paragraph-rsid="0047a1a9" style:font-size-asian="16pt" style:font-weight-asian="bold" style:font-size-complex="16pt" style:font-weight-complex="bold"/>
    </style:style>
    <style:style style:name="P4" style:family="paragraph" style:parent-style-name="Text_20_body">
      <style:text-properties officeooo:rsid="00147bbc" officeooo:paragraph-rsid="00147bbc"/>
    </style:style>
    <style:style style:name="P5" style:family="paragraph" style:parent-style-name="Text_20_body">
      <style:text-properties officeooo:rsid="00147bbc" officeooo:paragraph-rsid="00481a5c"/>
    </style:style>
    <style:style style:name="P6" style:family="paragraph" style:parent-style-name="Text_20_body">
      <style:text-properties officeooo:rsid="0032458c" officeooo:paragraph-rsid="0032458c"/>
    </style:style>
    <style:style style:name="P7" style:family="paragraph" style:parent-style-name="Text_20_body">
      <style:text-properties officeooo:rsid="0032458c" officeooo:paragraph-rsid="004ef41b"/>
    </style:style>
    <style:style style:name="P8" style:family="paragraph" style:parent-style-name="Text_20_body">
      <style:text-properties officeooo:rsid="0032458c" officeooo:paragraph-rsid="00541668"/>
    </style:style>
    <style:style style:name="P9" style:family="paragraph" style:parent-style-name="Text_20_body">
      <style:text-properties fo:font-style="italic" officeooo:rsid="003ef6b7" officeooo:paragraph-rsid="003ff962" style:font-style-asian="italic" style:font-style-complex="italic"/>
    </style:style>
    <style:style style:name="P10" style:family="paragraph" style:parent-style-name="Text_20_body">
      <style:text-properties fo:font-style="italic" fo:font-weight="normal" officeooo:rsid="003ff962" officeooo:paragraph-rsid="003ff962" style:font-style-asian="italic" style:font-weight-asian="normal" style:font-style-complex="italic" style:font-weight-complex="normal"/>
    </style:style>
    <style:style style:name="P11" style:family="paragraph" style:parent-style-name="Text_20_body">
      <style:text-properties fo:font-weight="bold" officeooo:rsid="00411267" officeooo:paragraph-rsid="00411267" style:font-weight-asian="bold" style:font-weight-complex="bold"/>
    </style:style>
    <style:style style:name="P12" style:family="paragraph" style:parent-style-name="Text_20_body">
      <style:text-properties officeooo:rsid="003ef6b7" officeooo:paragraph-rsid="003ef6b7"/>
    </style:style>
    <style:style style:name="P13" style:family="paragraph" style:parent-style-name="Text_20_body">
      <style:text-properties officeooo:rsid="003ef6b7" officeooo:paragraph-rsid="003ff962"/>
    </style:style>
    <style:style style:name="P14" style:family="paragraph" style:parent-style-name="Text_20_body">
      <style:text-properties officeooo:rsid="00411267" officeooo:paragraph-rsid="00411267"/>
    </style:style>
    <style:style style:name="P15" style:family="paragraph" style:parent-style-name="Text_20_body">
      <style:text-properties officeooo:rsid="001f17d3" officeooo:paragraph-rsid="001f17d3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Contents_20_Heading">
      <style:text-properties officeooo:paragraph-rsid="00481a5c"/>
    </style:style>
    <style:style style:name="P21" style:family="paragraph" style:parent-style-name="Standard">
      <style:text-properties officeooo:paragraph-rsid="004b01c7"/>
    </style:style>
    <style:style style:name="P22" style:family="paragraph" style:parent-style-name="Standard">
      <style:paragraph-properties fo:text-align="center" style:justify-single-word="false"/>
      <style:text-properties fo:font-size="22pt" fo:font-weight="bold" officeooo:rsid="0012e486" officeooo:paragraph-rsid="0012e486" style:font-size-asian="22pt" style:font-weight-asian="bold" style:font-size-complex="22pt" style:font-weight-complex="bold"/>
    </style:style>
    <style:style style:name="P23" style:family="paragraph" style:parent-style-name="Standard">
      <style:text-properties officeooo:rsid="00500ed5" officeooo:paragraph-rsid="00541668"/>
    </style:style>
    <style:style style:name="P24" style:family="paragraph" style:parent-style-name="Text_20_body">
      <style:text-properties officeooo:rsid="00500ed5" officeooo:paragraph-rsid="00541668"/>
    </style:style>
    <style:style style:name="P25" style:family="paragraph" style:parent-style-name="Table_20_Contents">
      <style:text-properties officeooo:rsid="000a5bec" officeooo:paragraph-rsid="00541668"/>
    </style:style>
    <style:style style:name="P26" style:family="paragraph" style:parent-style-name="Text_20_body">
      <style:text-properties officeooo:rsid="00373d64" officeooo:paragraph-rsid="00481a5c"/>
    </style:style>
    <style:style style:name="P27" style:family="paragraph" style:parent-style-name="Text_20_body">
      <style:text-properties officeooo:rsid="00132089" officeooo:paragraph-rsid="00481a5c"/>
    </style:style>
    <style:style style:name="P28" style:family="paragraph" style:parent-style-name="Text_20_body">
      <style:text-properties officeooo:rsid="0033ee30" officeooo:paragraph-rsid="0033ee30"/>
    </style:style>
    <style:style style:name="P29" style:family="paragraph" style:parent-style-name="Text_20_body">
      <style:text-properties officeooo:rsid="00228e73" officeooo:paragraph-rsid="00213401"/>
    </style:style>
    <style:style style:name="P30" style:family="paragraph" style:parent-style-name="Text_20_body">
      <style:text-properties officeooo:rsid="003cdea5"/>
    </style:style>
    <style:style style:name="P31" style:family="paragraph" style:parent-style-name="Text_20_body">
      <style:text-properties officeooo:rsid="0006e927" officeooo:paragraph-rsid="004b01c7"/>
    </style:style>
    <style:style style:name="P32" style:family="paragraph" style:parent-style-name="Text_20_body">
      <style:text-properties officeooo:rsid="004cfdbd" officeooo:paragraph-rsid="004cfdbd"/>
    </style:style>
    <style:style style:name="P33" style:family="paragraph" style:parent-style-name="Text_20_body">
      <style:text-properties officeooo:rsid="003594d5" officeooo:paragraph-rsid="00541668"/>
    </style:style>
    <style:style style:name="P34" style:family="paragraph" style:parent-style-name="Text_20_body">
      <style:text-properties fo:font-weight="normal" officeooo:rsid="00411267" officeooo:paragraph-rsid="00411267" style:font-weight-asian="normal" style:font-weight-complex="normal"/>
    </style:style>
    <style:style style:name="P35" style:family="paragraph" style:parent-style-name="Text_20_body">
      <style:text-properties officeooo:rsid="000c0d0a" officeooo:paragraph-rsid="00506dc8"/>
    </style:style>
    <style:style style:name="P36" style:family="paragraph" style:parent-style-name="Text_20_body">
      <style:text-properties officeooo:rsid="000c0d0a" officeooo:paragraph-rsid="00520cca"/>
    </style:style>
    <style:style style:name="P3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/>
      <style:text-properties fo:font-size="10pt" fo:font-style="italic" officeooo:rsid="000c0d0a" officeooo:paragraph-rsid="00520cca" style:font-size-asian="10pt" style:font-style-asian="italic" style:font-size-complex="10pt" style:font-style-complex="italic"/>
    </style:style>
    <style:style style:name="P38" style:family="paragraph" style:parent-style-name="Standard">
      <style:text-properties officeooo:rsid="000c0d0a" officeooo:paragraph-rsid="00506dc8"/>
    </style:style>
    <style:style style:name="P39" style:family="paragraph" style:parent-style-name="Standard">
      <style:text-properties officeooo:rsid="00500ed5" officeooo:paragraph-rsid="00541668"/>
    </style:style>
    <style:style style:name="P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3" style:family="paragraph" style:parent-style-name="Contents_20_Heading">
      <style:paragraph-properties fo:break-before="page"/>
    </style:style>
    <style:style style:name="P44" style:family="paragraph" style:parent-style-name="Heading_20_1">
      <style:paragraph-properties fo:break-before="page"/>
      <style:text-properties officeooo:paragraph-rsid="00481a5c"/>
    </style:style>
    <style:style style:name="P45" style:family="paragraph" style:parent-style-name="Heading_20_1">
      <style:text-properties officeooo:paragraph-rsid="00481a5c"/>
    </style:style>
    <style:style style:name="P46" style:family="paragraph" style:parent-style-name="Heading_20_1">
      <style:paragraph-properties fo:break-before="page"/>
    </style:style>
    <style:style style:name="P47" style:family="paragraph" style:parent-style-name="Heading_20_2">
      <style:text-properties officeooo:paragraph-rsid="00481a5c"/>
    </style:style>
    <style:style style:name="P48" style:family="paragraph" style:parent-style-name="Heading_20_2">
      <style:text-properties officeooo:paragraph-rsid="004b01c7"/>
    </style:style>
    <style:style style:name="P49" style:family="paragraph" style:parent-style-name="Heading_20_3">
      <style:paragraph-properties fo:break-before="page"/>
    </style:style>
    <style:style style:name="P50" style:family="paragraph" style:parent-style-name="Text_20_body" style:list-style-name="L1">
      <style:text-properties officeooo:rsid="00147bbc" officeooo:paragraph-rsid="00481a5c"/>
    </style:style>
    <style:style style:name="P51" style:family="paragraph" style:parent-style-name="Text_20_body" style:list-style-name="L1">
      <style:text-properties officeooo:rsid="0004c50a" officeooo:paragraph-rsid="00481a5c"/>
    </style:style>
    <style:style style:name="P52" style:family="paragraph" style:parent-style-name="Text_20_body" style:list-style-name="L2">
      <style:text-properties officeooo:rsid="0004c50a" officeooo:paragraph-rsid="00481a5c"/>
    </style:style>
    <style:style style:name="P53" style:family="paragraph" style:parent-style-name="Text_20_body" style:list-style-name="L2">
      <style:text-properties officeooo:rsid="00059bc1" officeooo:paragraph-rsid="00481a5c"/>
    </style:style>
    <style:style style:name="P54" style:family="paragraph" style:parent-style-name="Text_20_body" style:list-style-name="L3">
      <style:text-properties officeooo:rsid="0033ee30" officeooo:paragraph-rsid="0033ee30"/>
    </style:style>
    <style:style style:name="P55" style:family="paragraph" style:parent-style-name="Text_20_body" style:list-style-name="L4">
      <style:text-properties officeooo:rsid="004f9461" officeooo:paragraph-rsid="004f9461"/>
    </style:style>
    <style:style style:name="P56" style:family="paragraph" style:parent-style-name="Text_20_body" style:list-style-name="L5">
      <style:text-properties officeooo:rsid="000c0d0a" officeooo:paragraph-rsid="00506dc8"/>
    </style:style>
    <style:style style:name="P57" style:family="paragraph" style:parent-style-name="Text_20_body" style:list-style-name="L6">
      <style:text-properties officeooo:rsid="000c0d0a" officeooo:paragraph-rsid="00506dc8"/>
    </style:style>
    <style:style style:name="P58" style:family="paragraph" style:parent-style-name="Text_20_body" style:list-style-name="L7">
      <style:text-properties officeooo:rsid="000c0d0a" officeooo:paragraph-rsid="00506dc8"/>
    </style:style>
    <style:style style:name="P59" style:family="paragraph" style:parent-style-name="Text_20_body" style:list-style-name="L7">
      <style:text-properties style:use-window-font-color="true" loext:opacity="0%" fo:font-weight="normal" officeooo:rsid="000c0d0a" officeooo:paragraph-rsid="00506dc8" style:font-weight-asian="normal" style:font-weight-complex="normal"/>
    </style:style>
    <style:style style:name="P60" style:family="paragraph" style:parent-style-name="Text_20_body" style:list-style-name="L8">
      <style:text-properties officeooo:rsid="00500ed5" officeooo:paragraph-rsid="00541668"/>
    </style:style>
    <style:style style:name="P61" style:family="paragraph" style:parent-style-name="Text_20_body" style:list-style-name="L11">
      <style:text-properties officeooo:rsid="00500ed5" officeooo:paragraph-rsid="00541668"/>
    </style:style>
    <style:style style:name="P62" style:family="paragraph" style:parent-style-name="Text_20_body" style:list-style-name="L8">
      <style:text-properties officeooo:rsid="00541668" officeooo:paragraph-rsid="00541668"/>
    </style:style>
    <style:style style:name="P63" style:family="paragraph" style:parent-style-name="Text_20_body" style:list-style-name="L8">
      <style:text-properties officeooo:rsid="00541668" officeooo:paragraph-rsid="0055a024"/>
    </style:style>
    <style:style style:name="P64" style:family="paragraph" style:parent-style-name="Text_20_body" style:list-style-name="L9">
      <style:text-properties officeooo:rsid="0032458c" officeooo:paragraph-rsid="00541668"/>
    </style:style>
    <style:style style:name="P65" style:family="paragraph" style:parent-style-name="Text_20_body" style:list-style-name="L10">
      <style:text-properties officeooo:rsid="0032458c" officeooo:paragraph-rsid="00541668"/>
    </style:style>
    <style:style style:name="P66" style:family="paragraph" style:parent-style-name="Text_20_body" style:list-style-name="L12">
      <style:text-properties officeooo:rsid="005d018a" officeooo:paragraph-rsid="005d018a"/>
    </style:style>
    <style:style style:name="P67" style:family="paragraph" style:parent-style-name="Text_20_body" style:list-style-name="L13">
      <style:text-properties officeooo:rsid="005d018a" officeooo:paragraph-rsid="005d018a"/>
    </style:style>
    <style:style style:name="T1" style:family="text">
      <style:text-properties officeooo:rsid="00132089"/>
    </style:style>
    <style:style style:name="T2" style:family="text">
      <style:text-properties officeooo:rsid="00147bbc"/>
    </style:style>
    <style:style style:name="T3" style:family="text">
      <style:text-properties officeooo:rsid="002e952b"/>
    </style:style>
    <style:style style:name="T4" style:family="text">
      <style:text-properties officeooo:rsid="003ab8a0"/>
    </style:style>
    <style:style style:name="T5" style:family="text">
      <style:text-properties officeooo:rsid="0033ee30"/>
    </style:style>
    <style:style style:name="T6" style:family="text">
      <style:text-properties officeooo:rsid="0016167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ef6b7" style:font-weight-asian="bold" style:font-weight-complex="bold"/>
    </style:style>
    <style:style style:name="T9" style:family="text">
      <style:text-properties fo:font-weight="bold" officeooo:rsid="00500ed5" style:font-weight-asian="bold" style:font-weight-complex="bold"/>
    </style:style>
    <style:style style:name="T10" style:family="text">
      <style:text-properties fo:font-weight="bold" officeooo:rsid="00541668" style:font-weight-asian="bold" style:font-weight-complex="bold"/>
    </style:style>
    <style:style style:name="T11" style:family="text">
      <style:text-properties officeooo:rsid="00411267"/>
    </style:style>
    <style:style style:name="T12" style:family="text">
      <style:text-properties officeooo:rsid="003ff962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3ff962" style:font-weight-asian="normal" style:font-weight-complex="normal"/>
    </style:style>
    <style:style style:name="T15" style:family="text">
      <style:text-properties officeooo:rsid="001b0b9a"/>
    </style:style>
    <style:style style:name="T16" style:family="text">
      <style:text-properties officeooo:rsid="0004c50a"/>
    </style:style>
    <style:style style:name="T17" style:family="text">
      <style:text-properties officeooo:rsid="0049ed58"/>
    </style:style>
    <style:style style:name="T18" style:family="text">
      <style:text-properties officeooo:rsid="00059bc1"/>
    </style:style>
    <style:style style:name="T19" style:family="text">
      <style:text-properties officeooo:rsid="00089926"/>
    </style:style>
    <style:style style:name="T20" style:family="text">
      <style:text-properties officeooo:rsid="004b01c7"/>
    </style:style>
    <style:style style:name="T21" style:family="text">
      <style:text-properties officeooo:rsid="004cfdbd"/>
    </style:style>
    <style:style style:name="T22" style:family="text">
      <style:text-properties officeooo:rsid="004ef41b"/>
    </style:style>
    <style:style style:name="T23" style:family="text">
      <style:text-properties officeooo:rsid="00500ed5"/>
    </style:style>
    <style:style style:name="T24" style:family="text">
      <style:text-properties officeooo:rsid="00506dc8"/>
    </style:style>
    <style:style style:name="T25" style:family="text">
      <style:text-properties officeooo:rsid="00541668"/>
    </style:style>
    <style:style style:name="T26" style:family="text">
      <style:text-properties officeooo:rsid="0055a024"/>
    </style:style>
    <style:style style:name="T27" style:family="text">
      <style:text-properties officeooo:rsid="005743f2"/>
    </style:style>
    <style:style style:name="T28" style:family="text">
      <style:text-properties officeooo:rsid="00592830"/>
    </style:style>
    <style:style style:name="T29" style:family="text">
      <style:text-properties officeooo:rsid="00599081"/>
    </style:style>
    <style:style style:name="T30" style:family="text">
      <style:text-properties officeooo:rsid="005a070a"/>
    </style:style>
    <style:style style:name="T31" style:family="text">
      <style:text-properties officeooo:rsid="005d018a"/>
    </style:style>
    <style:style style:name="T32" style:family="text">
      <style:text-properties style:text-line-through-style="none" style:text-line-through-type="none" style:font-name="Google Sans" fo:font-size="12pt" style:text-underline-style="none" fo:font-weight="normal" style:text-blinking="false" loext:padding="0cm" loext:border="none"/>
    </style:style>
    <style:style style:name="T33" style:family="text">
      <style:text-properties style:text-line-through-style="none" style:text-line-through-type="none" style:font-name="Google Sans" fo:font-size="12pt" style:text-underline-style="none" fo:font-weight="normal" officeooo:rsid="005db2a3" style:text-blinking="false" loext:padding="0cm" loext:border="none"/>
    </style:style>
    <style:style style:name="T34" style:family="text">
      <style:text-properties style:text-line-through-style="none" style:text-line-through-type="none" style:font-name="Google Sans" fo:font-size="12pt" style:text-underline-style="none" fo:font-weight="bold" style:text-blinking="false" loext:padding="0cm" loext:border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697cm" fo:text-indent="-0.635cm" fo:margin-left="1.69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332cm" fo:text-indent="-0.635cm" fo:margin-left="2.332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67cm" fo:text-indent="-0.635cm" fo:margin-left="2.967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602cm" fo:text-indent="-0.635cm" fo:margin-left="3.602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237cm" fo:text-indent="-0.635cm" fo:margin-left="4.237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72cm" fo:text-indent="-0.635cm" fo:margin-left="4.872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507cm" fo:text-indent="-0.635cm" fo:margin-left="5.507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142cm" fo:text-indent="-0.635cm" fo:margin-left="6.14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777cm" fo:text-indent="-0.635cm" fo:margin-left="6.777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412cm" fo:text-indent="-0.635cm" fo:margin-left="7.412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Проект по курсу </text:p>
      <text:p text:style-name="P1"/>
      <text:p text:style-name="P22">MS SQL Server Developer</text:p>
      <text:p text:style-name="P1"/>
      <text:p text:style-name="P1"/>
      <text:p text:style-name="P3">Тема: </text:p>
      <text:p text:style-name="P2">Проектирование БД для управления личными финансами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9">Оглавление</text:p>
          </text:index-title>
          <text:p text:style-name="P16"><text:a xlink:type="simple" xlink:href="#__RefHeading___Toc13291_2642183413" text:style-name="Index_20_Link" text:visited-style-name="Index_20_Link">1. Общее описание проекта<text:tab/>3</text:a></text:p>
          <text:p text:style-name="P16"><text:a xlink:type="simple" xlink:href="#__RefHeading___Toc13293_2642183413" text:style-name="Index_20_Link" text:visited-style-name="Index_20_Link">2. Цели и назначение<text:tab/>3</text:a></text:p>
          <text:p text:style-name="P17"><text:a xlink:type="simple" xlink:href="#__RefHeading___Toc13295_2642183413" text:style-name="Index_20_Link" text:visited-style-name="Index_20_Link">2.1 Цели проекта<text:tab/>3</text:a></text:p>
          <text:p text:style-name="P17"><text:a xlink:type="simple" xlink:href="#__RefHeading___Toc13297_2642183413" text:style-name="Index_20_Link" text:visited-style-name="Index_20_Link">2.1. Объём MVP<text:tab/>3</text:a></text:p>
          <text:p text:style-name="P16"><text:a xlink:type="simple" xlink:href="#__RefHeading___Toc13828_2642183413" text:style-name="Index_20_Link" text:visited-style-name="Index_20_Link">3. Характеристики<text:tab/>4</text:a></text:p>
          <text:p text:style-name="P17"><text:a xlink:type="simple" xlink:href="#__RefHeading___Toc13301_2642183413" text:style-name="Index_20_Link" text:visited-style-name="Index_20_Link">3.1 Словарь<text:tab/>4</text:a></text:p>
          <text:p text:style-name="P17"><text:a xlink:type="simple" xlink:href="#__RefHeading___Toc13830_2642183413" text:style-name="Index_20_Link" text:visited-style-name="Index_20_Link">3.2 Ролевая модель<text:tab/>4</text:a></text:p>
          <text:p text:style-name="P17"><text:a xlink:type="simple" xlink:href="#__RefHeading___Toc13832_2642183413" text:style-name="Index_20_Link" text:visited-style-name="Index_20_Link">3.3 Ограничения проекта<text:tab/>4</text:a></text:p>
          <text:p text:style-name="P17"><text:a xlink:type="simple" xlink:href="#__RefHeading___Toc13844_2642183413" text:style-name="Index_20_Link" text:visited-style-name="Index_20_Link">3.4 Информационная модель<text:tab/>5</text:a></text:p>
          <text:p text:style-name="P18"><text:a xlink:type="simple" xlink:href="#__RefHeading___Toc13904_2642183413" text:style-name="Index_20_Link" text:visited-style-name="Index_20_Link">3.4.1 Сущности<text:tab/>5</text:a></text:p>
          <text:p text:style-name="P18"><text:a xlink:type="simple" xlink:href="#__RefHeading___Toc13848_2642183413" text:style-name="Index_20_Link" text:visited-style-name="Index_20_Link">3.4.2 Описание предметной области<text:tab/>6</text:a></text:p>
          <text:p text:style-name="P18"><text:a xlink:type="simple" xlink:href="#__RefHeading___Toc14867_2642183413" text:style-name="Index_20_Link" text:visited-style-name="Index_20_Link">3.4.3 Схема MVP базы данных<text:tab/>10</text:a></text:p>
          <text:p text:style-name="P16"><text:a xlink:type="simple" xlink:href="#__RefHeading___Toc13850_2642183413" text:style-name="Index_20_Link" text:visited-style-name="Index_20_Link">4. Требования к БД<text:tab/>11</text:a></text:p>
          <text:p text:style-name="P17"><text:a xlink:type="simple" xlink:href="#__RefHeading___Toc13852_2642183413" text:style-name="Index_20_Link" text:visited-style-name="Index_20_Link">4.1. Пользовательские истории и варианты использования<text:tab/>11</text:a></text:p>
          <text:p text:style-name="P18"><text:a xlink:type="simple" xlink:href="#__RefHeading___Toc13907_2642183413" text:style-name="Index_20_Link" text:visited-style-name="Index_20_Link">4.1.1 User Stories<text:tab/>11</text:a></text:p>
          <text:p text:style-name="P18"><text:a xlink:type="simple" xlink:href="#__RefHeading___Toc13836_2642183413" text:style-name="Index_20_Link" text:visited-style-name="Index_20_Link">4.1.2 Загрузка данных<text:tab/>11</text:a></text:p>
          <text:p text:style-name="P18"><text:a xlink:type="simple" xlink:href="#__RefHeading___Toc13842_2642183413" text:style-name="Index_20_Link" text:visited-style-name="Index_20_Link">4.1.3 Выгрузка отчётов<text:tab/>12</text:a></text:p>
          <text:p text:style-name="P17"><text:a xlink:type="simple" xlink:href="#__RefHeading___Toc13856_2642183413" text:style-name="Index_20_Link" text:visited-style-name="Index_20_Link">4.2 Функциональные требования<text:tab/>12</text:a></text:p>
          <text:p text:style-name="P17"><text:a xlink:type="simple" xlink:href="#__RefHeading___Toc13858_2642183413" text:style-name="Index_20_Link" text:visited-style-name="Index_20_Link">4.3 НФТ<text:tab/>12</text:a></text:p>
        </text:index-body>
      </text:table-of-content>
      <text:p text:style-name="P20"/>
      <text:p text:style-name="Text_20_body"/>
      <text:h text:style-name="P44" text:outline-level="1"><text:bookmark-start text:name="__RefHeading___Toc13291_2642183413"/>1. <text:span text:style-name="T1">Общее описание </text:span><text:span text:style-name="T17">проекта</text:span><text:bookmark-end text:name="__RefHeading___Toc13291_2642183413"/></text:h>
      <text:p text:style-name="P27">Разрабатываемое решение на базе СУБД MS SQL Server <text:span text:style-name="T16">является </text:span>предназначено для управления личными финансами физического лица (ФЛ) — резидента РФ.</text:p>
      <text:p text:style-name="P5">Модель данных опирается на базовые принцип<text:span text:style-name="T16">ы</text:span> бухгалтерского учёта, принятые в РФ, с отдельными допущениями.</text:p>
      <text:p text:style-name="P5"/>
      <text:h text:style-name="P45" text:outline-level="1"><text:bookmark-start text:name="__RefHeading___Toc13293_2642183413"/>2. <text:span text:style-name="T2">Цели и назначение</text:span><text:bookmark-end text:name="__RefHeading___Toc13293_2642183413"/></text:h>
      <text:h text:style-name="P47" text:outline-level="2"><text:bookmark-start text:name="__RefHeading___Toc13295_2642183413"/>2.1 <text:span text:style-name="T2">Цели проекта</text:span><text:bookmark-end text:name="__RefHeading___Toc13295_2642183413"/></text:h>
      <text:p text:style-name="P5">Проектирование базы данных выполняется в рамках разработки проекта по созданию системы управления личными финансами.</text:p>
      <text:p text:style-name="P5">Проект ориентирован на создание комплексной системы управления личными финансами.</text:p>
      <text:p text:style-name="P5"><text:span text:style-name="T7">Цель проекта </text:span>— разработка БД для <text:span text:style-name="T3">анализа и </text:span>управления личными финансами.</text:p>
      <text:p text:style-name="P5"><text:span text:style-name="T16">Для понимания роли разрабатываемой базы данных приведём п</text:span>олный скоуп <text:span text:style-name="T16">вышестоящего </text:span>проекта:</text:p>
      <text:list xml:id="list3428569833" text:style-name="L1">
        <text:list-item>
          <text:p text:style-name="P50">Базы данных по направлениям, включая, но не ограничиваясь: </text:p>
          <text:list>
            <text:list-item>
              <text:p text:style-name="P50">учёт и управление операционной деятельностью (повседневные расходы)</text:p>
            </text:list-item>
            <text:list-item>
              <text:p text:style-name="P50">учёт и управление инвестиционной деятельностью (долговременные вложения)</text:p>
            </text:list-item>
            <text:list-item>
              <text:p text:style-name="P50">учёт и управление имуществом (предполагается управление налогооблагаемой имущественной базой)</text:p>
            </text:list-item>
          </text:list>
        </text:list-item>
        <text:list-item>
          <text:p text:style-name="P51">Систему классификации данных</text:p>
        </text:list-item>
        <text:list-item>
          <text:p text:style-name="P50">Систему для анализа и принятия решений.</text:p>
        </text:list-item>
      </text:list>
      <text:p text:style-name="P5">В рамках проекта по курсу MS SQL <text:span text:style-name="T16">будет реализовываться MVP (минимальный работоспособный проект) базы данных с аналитическим инструментом для целей моделирования и оценки концептуальной правильности направления разработки.</text:span></text:p>
      <text:p text:style-name="P27"/>
      <text:h text:style-name="P47" text:outline-level="2"><text:bookmark-start text:name="__RefHeading___Toc13297_2642183413"/><text:span text:style-name="T2">2</text:span>.1. Объём MVP<text:bookmark-end text:name="__RefHeading___Toc13297_2642183413"/></text:h>
      <text:p text:style-name="P26">В рамках <text:span text:style-name="T16">MVP </text:span>предполагается реализация:</text:p>
      <text:list xml:id="list1798540879" text:style-name="L2">
        <text:list-item>
          <text:p text:style-name="P52">Хранение данных по счетам (картам с привязанными счетами):</text:p>
          <text:list>
            <text:list-item>
              <text:p text:style-name="P52">баланс на дату</text:p>
            </text:list-item>
            <text:list-item>
              <text:p text:style-name="P52">приходно/расходные операции</text:p>
            </text:list-item>
          </text:list>
        </text:list-item>
        <text:list-item>
          <text:p text:style-name="P53">Детализация данных по:</text:p>
          <text:list>
            <text:list-item>
              <text:p text:style-name="P53">клиентам (вторая сторона приходно/расходной операции)</text:p>
            </text:list-item>
            <text:list-item>
              <text:p text:style-name="P53"><text:soft-page-break/>сделкам (аналитическая сущность для верхнеуровневой агрегации счетов)</text:p>
            </text:list-item>
          </text:list>
        </text:list-item>
        <text:list-item>
          <text:p text:style-name="P53">Пользовательских отчётов (баланс, движение денежных средств) в виде</text:p>
          <text:list>
            <text:list-item>
              <text:p text:style-name="P53">витрин БД</text:p>
            </text:list-item>
            <text:list-item>
              <text:p text:style-name="P53">OLAP-куба на базе витрин</text:p>
            </text:list-item>
          </text:list>
        </text:list-item>
      </text:list>
      <text:h text:style-name="Heading_20_1" text:outline-level="1"><text:bookmark-start text:name="__RefHeading___Toc13828_2642183413"/>3. Характери<text:span text:style-name="T4">с</text:span>тики<text:bookmark-end text:name="__RefHeading___Toc13828_2642183413"/></text:h>
      <text:h text:style-name="P48" text:outline-level="2"><text:bookmark-start text:name="__RefHeading___Toc13301_2642183413"/>3.1 <text:span text:style-name="T18">Словарь</text:span><text:bookmark-end text:name="__RefHeading___Toc13301_2642183413"/></text:h>
      <text:p text:style-name="P31">Клиент — вторая сторона сделки (это может быть торговая точка (для торговых операций), банк (например для начисления процентов))</text:p>
      <text:p text:style-name="P31">Договор — агрегат операций (например, покупке в магазине соответствует одна сделка — одна проводка, депозиту в банке соответствует несколько проводок: пополнение счёта, начисление процентов, закрытие счёта…)</text:p>
      <text:p text:style-name="P31">Проводка — денежная операция, одной из сторон которой является владелец БД. Всегда включает в себя 2 стороны.</text:p>
      <text:p text:style-name="P31">Счёт — в общем случае синтетическая сущность, при возможности (например для банковского вклада или уплаты налогов) имеет идентификатор 20-значный принятый в <text:span text:style-name="T19">финансовой системе РФ</text:span>.</text:p>
      <text:p text:style-name="P21"/>
      <text:h text:style-name="Heading_20_2" text:outline-level="2"><text:bookmark-start text:name="__RefHeading___Toc13830_2642183413"/>3.<text:span text:style-name="T23">2</text:span> <text:span text:style-name="T2">Ролевая модель</text:span><text:bookmark-end text:name="__RefHeading___Toc13830_2642183413"/></text:h>
      <text:p text:style-name="P4">Для MVP-версии разделение ролей пользователей не предусмотрено.</text:p>
      <text:p text:style-name="P4"><text:span text:style-name="T5">Для </text:span>целей дальнейшего развития <text:span text:style-name="T5">структура хранения данных должна предусматривать следующие контуры:</text:span></text:p>
      <text:p text:style-name="P4">Schema S<text:span text:style-name="T20">TA</text:span>GE — <text:span text:style-name="T21">схема для буферных таблиц загрузки данных, подготовки данных, историзованного хранения загруженных даннных.</text:span></text:p>
      <text:p text:style-name="P4">Schema Accounting — <text:span text:style-name="T21">основная схема хранения и расчётный слой</text:span></text:p>
      <text:p text:style-name="P4">Schema Reports — <text:span text:style-name="T21">схема пользовательских представлений и OLAP</text:span></text:p>
      <text:p text:style-name="P32">При развитии проекта предполагается несколько функциональных ролей:</text:p>
      <text:list xml:id="list3821432458" text:style-name="L3">
        <text:list-item>
          <text:p text:style-name="P54">Пользователь БД — доступ на чтение, схема <text:span text:style-name="T21">Reports</text:span></text:p>
        </text:list-item>
        <text:list-item>
          <text:p text:style-name="P54">Пользователь аналитик — доступ на чтение и изменение <text:span text:style-name="T21">схемы</text:span> <text:span text:style-name="T21">Stage, чтение схемы Accounting (ограниченное изменение через запуск процедур для загруженных данных)</text:span></text:p>
        </text:list-item>
        <text:list-item>
          <text:p text:style-name="P54">Пользователь <text:span text:style-name="T21">разработчик/администратор</text:span> — полный доступ</text:p>
        </text:list-item>
      </text:list>
      <text:p text:style-name="P28"/>
      <text:h text:style-name="Heading_20_2" text:outline-level="2"><text:bookmark-start text:name="__RefHeading___Toc13832_2642183413"/>3.<text:span text:style-name="T23">3</text:span> <text:span text:style-name="T6">Ограничения проекта</text:span><text:bookmark-end text:name="__RefHeading___Toc13832_2642183413"/></text:h>
      <text:p text:style-name="P6">Проект реализуется в объёме MVP для оценки целесообразности развития.</text:p>
      <text:p text:style-name="P7"><text:soft-page-break/>В проекте для целей формирования отчётности используется механизм трансформации <text:span text:style-name="T22">отчётности:</text:span></text:p>
      <text:list xml:id="list4072126458" text:style-name="L4">
        <text:list-item>
          <text:p text:style-name="P55">Любой счёт имеет нулевой баланс на дату создания</text:p>
        </text:list-item>
        <text:list-item>
          <text:p text:style-name="P55">Любое изменение состояния счёта отражается через проводку модифицирующую состояние, например:</text:p>
          <text:list>
            <text:list-item>
              <text:p text:style-name="P55">при отражении реальной операции по счёту — создаётся проводка на основе загружаемых данных</text:p>
            </text:list-item>
            <text:list-item>
              <text:p text:style-name="P55">при изменении баланса счёта принудительно (процедурой) — создаётся техническая проводка (корректирующая)</text:p>
            </text:list-item>
            <text:list-item>
              <text:p text:style-name="P55">при детализации какой-либо операции по счёту — созадётся набор проводок (сторно суммы, создание набора проводок детализирующих)</text:p>
            </text:list-item>
          </text:list>
        </text:list-item>
        <text:list-item>
          <text:p text:style-name="P55">Состояние счёта фиксируется на отчётную дату (последний день месяца, квартала, года) — даты определяются в соответствии с порядком ведения фин.учёта в РФ (т. к. налоги платят все).</text:p>
        </text:list-item>
      </text:list>
      <text:h text:style-name="Heading_20_2" text:outline-level="2"><text:bookmark-start text:name="__RefHeading___Toc13844_2642183413"/>3.<text:span text:style-name="T25">4</text:span> Информационная <text:span text:style-name="T23">модель</text:span><text:bookmark-end text:name="__RefHeading___Toc13844_2642183413"/></text:h>
      <text:h text:style-name="Heading_20_3" text:outline-level="3"><text:bookmark-start text:name="__RefHeading___Toc13904_2642183413"/><text:span text:style-name="T9">3.</text:span><text:span text:style-name="T10">4</text:span><text:span text:style-name="T9">.1 </text:span><text:span text:style-name="T8">Сущности</text:span><text:bookmark-end text:name="__RefHeading___Toc13904_2642183413"/></text:h>
      <text:p text:style-name="P12"><text:span text:style-name="T7">Контрагент</text:span> — юр.лицо, физ.лицо, иное лицо (например ФНС…), являющееся второй стороной сделки <text:span text:style-name="T11">(первой стороной считается владелец БД)</text:span>.</text:p>
      <text:p text:style-name="P12"><text:span text:style-name="T7">Договор</text:span> (сделка) — любое движение рассматривается как сделка. Характеризуются 2-мя сторонами (т. к. БД разрабатывается для личного использования, одной из сторон всегда будет владелец). Характеристики основного справочника: наименование, клиент (вторая сторона), дата создания, дата окончания, валидность (действительность), источник (откуда пришёл договор, больше служебная информация).</text:p>
      <text:p text:style-name="P12"><text:span text:style-name="T7">Счёт</text:span> — учётная запись к которой привязывается сумма. Для баланса — один счёт, для проводки — два счёта (Дт, Кт). Классифицируются по балансовым счетам 2-го порядка. За основу принят план счетов 94-н, упрощённый для предметной области. Основные параметры — номер счёта, наименование (описание), дата создания, дата закрытия, владелец (клиент), текущее состояние, балансовый счёт.</text:p>
      <text:p text:style-name="P9">Примечание: </text:p>
      <text:p text:style-name="P9"><text:span text:style-name="T12">1. </text:span>такая сущность как «счёт в банке», рассматривается как <text:span text:style-name="T7">договор</text:span><text:span text:style-name="T13"> к которому привязан счёт </text:span><text:span text:style-name="T14">(счета)</text:span><text:span text:style-name="T13">. Данные по банку определяются от договора и могут быть расширены через механизм частных справочников договоров, связанных через «источник», например «договоры с кредитными организациям» - отдельный справочник, хранящий дополнительные параметры, либо через механизм EAV. Данное расширение предметной области выходит за границы MVP.</text:span></text:p>
      <text:p text:style-name="P10"/>
      <text:p text:style-name="P13"><text:span text:style-name="T7">Проводка</text:span> — отражение движения денежных средств <text:span text:style-name="T11">между счетами</text:span>. Параметры: сумма, Дт.счёт, Кт.счёт, основание (описание), договор, дата-время, клиент.</text:p>
      <text:p text:style-name="P14"><text:soft-page-break/><text:span text:style-name="T7">Баланс счёта</text:span> — количество денежных средств, отражённых на счёте на конкретную дату. Формируется на основании <text:span text:style-name="T7">баланса</text:span><text:span text:style-name="T13"> счёта на предыдущую дату и всех проводок по счёту.</text:span></text:p>
      <text:p text:style-name="P11">Отчёт — <text:span text:style-name="T13">пользовательское представление данных по счетам/договорам, иным аналитикам, рассчитанным на заданную дату или за заданный интервал времени (между датами).</text:span></text:p>
      <text:p text:style-name="P34"/>
      <text:h text:style-name="Heading_20_3" text:outline-level="3"><text:bookmark-start text:name="__RefHeading___Toc13848_2642183413"/>3.<text:span text:style-name="T25">4</text:span>.<text:span text:style-name="T25">2</text:span> <text:span text:style-name="T24">Описание</text:span> предметной области<text:bookmark-end text:name="__RefHeading___Toc13848_2642183413"/></text:h>
      <text:p text:style-name="P38">Описание предметной области</text:p>
      <text:p text:style-name="P35">База данных обеспечивает следующие операции:</text:p>
      <text:list xml:id="list1007540521" text:style-name="L5">
        <text:list-item>
          <text:p text:style-name="P56">Загрузку данных:</text:p>
          <text:list>
            <text:list-item>
              <text:p text:style-name="P56">О состоянии счёта (загрузка, обновление/уточнение)</text:p>
            </text:list-item>
            <text:list-item>
              <text:p text:style-name="P56">Операциях по счёту</text:p>
            </text:list-item>
          </text:list>
        </text:list-item>
        <text:list-item>
          <text:p text:style-name="P56">Хранение данных</text:p>
          <text:list>
            <text:list-item>
              <text:p text:style-name="P56">Данных о счёте (владелец, тип счёта)</text:p>
            </text:list-item>
            <text:list-item>
              <text:p text:style-name="P56">Операций по счёту (в значении бухгалтерских проводок)</text:p>
            </text:list-item>
            <text:list-item>
              <text:p text:style-name="P56">Состояния (баланса) счёта на дату</text:p>
            </text:list-item>
          </text:list>
        </text:list-item>
        <text:list-item>
          <text:p text:style-name="P56">Формирование отчётов:</text:p>
          <text:list>
            <text:list-item>
              <text:p text:style-name="P56">О состоянии счёта на конкретную дату</text:p>
            </text:list-item>
            <text:list-item>
              <text:p text:style-name="P56">о прибылях и убытках (баланс приходно/расходных операций на этапе MVP) за заданный период</text:p>
            </text:list-item>
          </text:list>
        </text:list-item>
        <text:list-item>
          <text:p text:style-name="P56">Представление отчётов в аналитической системе (OLAP-куб)</text:p>
        </text:list-item>
      </text:list>
      <text:p text:style-name="P35">База данных обеспечивает следующие технологические операции:</text:p>
      <text:list xml:id="list2327686771" text:style-name="L6">
        <text:list-item>
          <text:p text:style-name="P57">Валидацию входящих данных в соответствии с заданными параметрами (на этапе MVP: консистентность данных, соответствие типов)</text:p>
        </text:list-item>
        <text:list-item>
          <text:p text:style-name="P57">Расчёт баланса на дату</text:p>
        </text:list-item>
        <text:list-item>
          <text:p text:style-name="P57">Формирование и хранение отчётов</text:p>
        </text:list-item>
      </text:list>
      <text:p text:style-name="P35">Для пользователя БД должны быть доступны операции:</text:p>
      <text:list xml:id="list464775709" text:style-name="L7">
        <text:list-item>
          <text:p text:style-name="P58">Загрузка данных из XLS-файла за период</text:p>
        </text:list-item>
        <text:list-item>
          <text:p text:style-name="P58">Просмотр отчётов (BS, PL)</text:p>
        </text:list-item>
        <text:list-item>
          <text:p text:style-name="P58">Выгрузка ОПУ за период</text:p>
        </text:list-item>
        <text:list-item>
          <text:p text:style-name="P58">Выгрузка баланса на дату</text:p>
        </text:list-item>
        <text:list-item>
          <text:p text:style-name="P59">Выгрузка справочников (клиенты, договоры, счета)</text:p>
        </text:list-item>
      </text:list>
      <text:p text:style-name="P36">На этапе MVP ER-диаграмму можно представить в следующем виде:</text:p>
      <text:p text:style-name="P36"/>
      <text:p text:style-name="P36"><draw:frame draw:style-name="fr1" draw:name="Image1" text:anchor-type="char" svg:width="17cm" svg:height="9.253cm" draw:z-index="0"><draw:image xlink:href="Pictures/1000000000000506000002BC6C4E50FAFF165EFB.png" xlink:type="simple" xlink:show="embed" xlink:actuate="onLoad" draw:mime-type="image/png"/></draw:frame><text:soft-page-break/>Текст диграммы в формате plantUML:</text:p>
      <text:p text:style-name="P37">@startuml</text:p>
      <text:p text:style-name="P37">'Диаграмма ERD MVP-проекта</text:p>
      <text:p text:style-name="P37">' v.1.2</text:p>
      <text:p text:style-name="P37">'left to right direction</text:p>
      <text:p text:style-name="P37">' Скрытие теней и кружков</text:p>
      <text:p text:style-name="P37">hide circle</text:p>
      <text:p text:style-name="P37">hide spot</text:p>
      <text:p text:style-name="P37"/>
      <text:p text:style-name="P37">'Определение сущностей</text:p>
      <text:p text:style-name="P37">'Счёт, всегда на 1 клиента, второй - владелец базы</text:p>
      <text:p text:style-name="P37">'Номер счёта 20-значник, может быть синтетический</text:p>
      <text:p text:style-name="P37">Entity DIC_ACCOUNT{</text:p>
      <text:p text:style-name="P37"><text:s text:c="4"/>* id_account : int &lt;&lt;PK&gt;&gt;</text:p>
      <text:p text:style-name="P37">--</text:p>
      <text:p text:style-name="P37"><text:s text:c="4"/>* account_name : varchar(20)</text:p>
      <text:p text:style-name="P37"><text:s text:c="4"/>* id_client : int</text:p>
      <text:p text:style-name="P37"><text:s text:c="4"/>* accunt_description: varchar(512)</text:p>
      <text:p text:style-name="P37"><text:s text:c="4"/>* id_bal2 : int &lt;&lt;FK&gt;&gt;</text:p>
      <text:p text:style-name="P37"><text:s text:c="4"/>* valid_to : date</text:p>
      <text:p text:style-name="P37">}</text:p>
      <text:p text:style-name="P37"/>
      <text:p text:style-name="P37"/>
      <text:p text:style-name="P37">'Клиент (справочник)</text:p>
      <text:p text:style-name="P37">Entity DIC_CLIENT</text:p>
      <text:p text:style-name="P37">{</text:p>
      <text:p text:style-name="P37"><text:s text:c="4"/>* id_client : INT &lt;&lt;PK&gt;&gt;</text:p>
      <text:p text:style-name="P37">--</text:p>
      <text:p text:style-name="P37"><text:s text:c="4"/>* client_name : varchar(512)</text:p>
      <text:p text:style-name="P37"><text:s text:c="4"/>* create_date : date</text:p>
      <text:p text:style-name="P37"><text:s text:c="4"/>* valid: to : date</text:p>
      <text:p text:style-name="P37"><text:s text:c="4"/>* is_del : BOOL</text:p>
      <text:p text:style-name="P37">}</text:p>
      <text:p text:style-name="P37"/>
      <text:p text:style-name="P37">'Договор (справочник)</text:p>
      <text:p text:style-name="P37">Entity DIC_AGREEMENT</text:p>
      <text:p text:style-name="P37">{</text:p>
      <text:p text:style-name="P37"><text:s text:c="4"/>* id_agreement : INT &lt;&lt;PK&gt;&gt;</text:p>
      <text:p text:style-name="P37">--</text:p>
      <text:p text:style-name="P37"><text:soft-page-break/><text:s text:c="4"/>* agreement_name : varchar(512)</text:p>
      <text:p text:style-name="P37"><text:s text:c="4"/>* create_date : date</text:p>
      <text:p text:style-name="P37"><text:s text:c="4"/>* valid: to : date</text:p>
      <text:p text:style-name="P37"><text:s text:c="4"/>* is_del : BOOL</text:p>
      <text:p text:style-name="P37">}</text:p>
      <text:p text:style-name="P37"/>
      <text:p text:style-name="P37">'Проводка (основной поток данных, все поля обязательные)</text:p>
      <text:p text:style-name="P37">Entity FCT_CARRY</text:p>
      <text:p text:style-name="P37">{</text:p>
      <text:p text:style-name="P37"><text:s text:c="4"/>* id_CARRY : INT &lt;&lt;PK&gt;&gt;</text:p>
      <text:p text:style-name="P37"><text:s text:c="2"/>--</text:p>
      <text:p text:style-name="P37"><text:s text:c="4"/>* carry_date : DATE</text:p>
      <text:p text:style-name="P37">'описание проводки</text:p>
      <text:p text:style-name="P37"><text:s text:c="4"/>* description : varchar(512)</text:p>
      <text:p text:style-name="P37"><text:s text:c="4"/>* id_account_dbt : int &lt;&lt;FK&gt;&gt;</text:p>
      <text:p text:style-name="P37"><text:s text:c="4"/>* id_account_crd : int &lt;&lt;FK&gt;&gt;</text:p>
      <text:p text:style-name="P37"><text:s text:c="4"/>* id_agreement : int &lt;&lt;FK&gt;&gt;</text:p>
      <text:p text:style-name="P37"><text:s text:c="4"/>* VL : float</text:p>
      <text:p text:style-name="P37"><text:s text:c="4"/>* transaction_way : int &lt;&lt;FK&gt;&gt;</text:p>
      <text:p text:style-name="P37">'дата создания проводки</text:p>
      <text:p text:style-name="P37"><text:s text:c="4"/>* SRC_date : datetime</text:p>
      <text:p text:style-name="P37">'пользователь создавший проводку</text:p>
      <text:p text:style-name="P37">' <text:s text:c="3"/>* SRC_user : int &lt;&lt;FK&gt;&gt;</text:p>
      <text:p text:style-name="P37">'основание для создания проводки (из справочника)'</text:p>
      <text:p text:style-name="P37">' <text:s text:c="3"/>* carry_ground : int &lt;&lt;FK&gt;&gt;</text:p>
      <text:p text:style-name="P37">}</text:p>
      <text:p text:style-name="P37"/>
      <text:p text:style-name="P37">'Остаток на дату (таблица заполняемая расчётными процедурами)</text:p>
      <text:p text:style-name="P37">Entity DM_REST</text:p>
      <text:p text:style-name="P37">{</text:p>
      <text:p text:style-name="P37"><text:s text:c="4"/>* id_date : date</text:p>
      <text:p text:style-name="P37"><text:s text:c="4"/>* id_account : int &lt;&lt;FK&gt;&gt;</text:p>
      <text:p text:style-name="P37"><text:s text:c="4"/>* value : float</text:p>
      <text:p text:style-name="P37">}</text:p>
      <text:p text:style-name="P37"/>
      <text:p text:style-name="P37">'Классификаторы</text:p>
      <text:p text:style-name="P37">'Справочник балансовых счетов, версионный</text:p>
      <text:p text:style-name="P37">Entity DIC_BAL2</text:p>
      <text:p text:style-name="P37">{</text:p>
      <text:p text:style-name="P37"><text:s text:c="4"/>* id_bal2 : int &lt;&lt;PK&gt;&gt;</text:p>
      <text:p text:style-name="P37"><text:s text:c="4"/>* description : varchar(512)</text:p>
      <text:p text:style-name="P37"><text:s text:c="4"/>* id_bal2_parent : int</text:p>
      <text:p text:style-name="P37"><text:s text:c="4"/>* valid_to : date</text:p>
      <text:p text:style-name="P37"><text:s text:c="4"/>* id_del : BOOL</text:p>
      <text:p text:style-name="P37"><text:s text:c="4"/>* id_bal2_version : int &lt;&lt;FK&gt;&gt;</text:p>
      <text:p text:style-name="P37">}</text:p>
      <text:p text:style-name="P37"/>
      <text:p text:style-name="P37">'версии справочника (например разные планы счетов)</text:p>
      <text:p text:style-name="P37">Entity DIC_BAL2_VERSION</text:p>
      <text:p text:style-name="P37">{</text:p>
      <text:p text:style-name="P37"><text:s text:c="4"/>* id_bal2_version : int &lt;&lt;PK&gt;&gt;</text:p>
      <text:p text:style-name="P37"><text:s text:c="4"/>* version_name : varchar(1024)</text:p>
      <text:p text:style-name="P37"><text:s text:c="4"/>* is_del : BOOL</text:p>
      <text:p text:style-name="P37">}</text:p>
      <text:p text:style-name="P37"/>
      <text:p text:style-name="P37"/>
      <text:p text:style-name="P37">'Статьи баланса (для отчётов)</text:p>
      <text:p text:style-name="P37">'Статьи ОПУ (для отчётов)</text:p>
      <text:p text:style-name="P37">'Балансовые счета (для классификаторов)</text:p>
      <text:p text:style-name="P37"/>
      <text:p text:style-name="P37">'------------------Связи</text:p>
      <text:p text:style-name="P37">'Клиент - договор, счёт</text:p>
      <text:p text:style-name="P37">DIC_CLIENT ||-left-|{ DIC_ACCOUNT : владеет счётом (1:N)</text:p>
      <text:p text:style-name="P37"><text:soft-page-break/>'второй стороной договора всегда рассматривается владелец базы для которого она ведётся</text:p>
      <text:p text:style-name="P37">DIC_CLIENT ||--|{ DIC_AGREEMENT : договор заключен с (1:N)</text:p>
      <text:p text:style-name="P37"/>
      <text:p text:style-name="P37">'Проводка - счёт (движение между счетами)</text:p>
      <text:p text:style-name="P37">DIC_ACCOUNT ||-down-|{ FCT_CARRY : проводке нужны 2 счёта (1:2)</text:p>
      <text:p text:style-name="P37">DIC_BAL2 ||-|{ DIC_ACCOUNT : каждый счёт классифицирован</text:p>
      <text:p text:style-name="P37"/>
      <text:p text:style-name="P37">DIC_BAL2_VERSION ||-down-|{ DIC_BAL2 : каждый счёт в каком-то справочнике</text:p>
      <text:p text:style-name="P37"/>
      <text:p text:style-name="P37">DIC_AGREEMENT ||-left-|{ FCT_CARRY : договор обслуживается (1:N)</text:p>
      <text:p text:style-name="P37"/>
      <text:p text:style-name="P37">'Остаток на дату - счёт (историческая таблица)</text:p>
      <text:p text:style-name="P37">DIC_ACCOUNT ||-up-|{ DM_REST</text:p>
      <text:p text:style-name="P37"/>
      <text:p text:style-name="P37"/>
      <text:p text:style-name="P37"/>
      <text:p text:style-name="P37">@enduml</text:p>
      <text:p text:style-name="Text_20_body"/>
      <text:p text:style-name="Text_20_body"/>
      <text:h text:style-name="P49" text:outline-level="3"><text:bookmark-start text:name="__RefHeading___Toc14867_2642183413"/>3.4.3 Схема MVP базы данных<text:bookmark-end text:name="__RefHeading___Toc14867_2642183413"/></text:h>
      <text:p text:style-name="Text_20_body"><draw:frame draw:style-name="fr1" draw:name="Image2" text:anchor-type="char" svg:width="17cm" svg:height="17.579cm" draw:z-index="1"><draw:image xlink:href="Pictures/10000000000003AA000003CAD1AD40442C17CB66.png" xlink:type="simple" xlink:show="embed" xlink:actuate="onLoad" draw:mime-type="image/png"/></draw:frame></text:p>
      <text:h text:style-name="P46" text:outline-level="1"><text:bookmark-start text:name="__RefHeading___Toc13850_2642183413"/>4. Требования к БД<text:bookmark-end text:name="__RefHeading___Toc13850_2642183413"/></text:h>
      <text:h text:style-name="Heading_20_2" text:outline-level="2"><text:bookmark-start text:name="__RefHeading___Toc13852_2642183413"/>4.1. Пользовательские истории <text:span text:style-name="T26">и варианты использования</text:span><text:bookmark-end text:name="__RefHeading___Toc13852_2642183413"/></text:h>
      <text:h text:style-name="Heading_20_3" text:outline-level="3"><text:bookmark-start text:name="__RefHeading___Toc13907_2642183413"/>4.1.1 <text:span text:style-name="T26">User Stories</text:span><text:bookmark-end text:name="__RefHeading___Toc13907_2642183413"/></text:h>
      <text:p text:style-name="P23">Для целей проекта можно выделить несколько основных пользовательских историй: </text:p>
      <text:p text:style-name="P2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5">Пользовательская история</text:p>
          </table:table-cell>
          <table:table-cell table:style-name="Table1.B1" office:value-type="string">
            <text:p text:style-name="P25">Сущности</text:p>
          </table:table-cell>
        </table:table-row>
        <table:table-row>
          <table:table-cell table:style-name="Table1.A2" office:value-type="string">
            <text:p text:style-name="P25">Я, как владелец, хочу видеть текущее состояние баланса счетов/карт, чтобы контролировать текущее состояние счетов.</text:p>
          </table:table-cell>
          <table:table-cell table:style-name="Table1.B2" office:value-type="string">
            <text:p text:style-name="P25">Счёт, баланс, отчётная дата</text:p>
          </table:table-cell>
        </table:table-row>
        <table:table-row>
          <table:table-cell table:style-name="Table1.A2" office:value-type="string">
            <text:p text:style-name="P25">Я, как владелец, хочу иметь видеть приходно/расходные операции по счетам/картам, чтобы оценить их правомерность.</text:p>
          </table:table-cell>
          <table:table-cell table:style-name="Table1.B2" office:value-type="string">
            <text:p text:style-name="P25">Счёт (счёт карты), операция (проводка)</text:p>
          </table:table-cell>
        </table:table-row>
        <table:table-row>
          <table:table-cell table:style-name="Table1.A2" office:value-type="string">
            <text:p text:style-name="P25">Я, как пользователь, хочу иметь возможность загружать проводки пулом, чтобы снизить затраты времени на учётные операции.</text:p>
          </table:table-cell>
          <table:table-cell table:style-name="Table1.B2" office:value-type="string">
            <text:p text:style-name="P25">Проводка, набор проводок, операция загрузки</text:p>
          </table:table-cell>
        </table:table-row>
        <table:table-row>
          <table:table-cell table:style-name="Table1.A2" office:value-type="string">
            <text:p text:style-name="P25">Я, как владелец, хочу иметь возможность табличной выгрузки данных, чтобы контролировать каждую операцию.</text:p>
          </table:table-cell>
          <table:table-cell table:style-name="Table1.B2" office:value-type="string">
            <text:p text:style-name="P25">Отчёт, операция (проводка)</text:p>
          </table:table-cell>
        </table:table-row>
        <table:table-row>
          <table:table-cell table:style-name="Table1.A2" office:value-type="string">
            <text:p text:style-name="P25">Я, как владелец, хочу иметь возможность настройки периода просматриваемых отчётов, чтобы проводить анализ разсходов.</text:p>
          </table:table-cell>
          <table:table-cell table:style-name="Table1.B2" office:value-type="string">
            <text:p text:style-name="P25">Календарный период, баланс</text:p>
          </table:table-cell>
        </table:table-row>
      </table:table>
      <text:p text:style-name="P33"/>
      <text:p text:style-name="P33"/>
      <text:p text:style-name="P33"><text:span text:style-name="T23">На их основе сформировать такие </text:span><text:span text:style-name="T25">варианты использования</text:span><text:span text:style-name="T23"> как</text:span>:</text:p>
      <text:list xml:id="list1526143984" text:style-name="L8">
        <text:list-item>
          <text:p text:style-name="P62">Административные:</text:p>
          <text:list>
            <text:list-item>
              <text:p text:style-name="P62">занесение записей в справочник счетов <text:span text:style-name="T26">(пользователь вручную или система на основании загружаемых данных)</text:span></text:p>
            </text:list-item>
            <text:list-item>
              <text:p text:style-name="P63">занесение записей в справочник договоров <text:span text:style-name="T26">(пользователь вручную или система на основании загружаемых данных)</text:span></text:p>
            </text:list-item>
            <text:list-item>
              <text:p text:style-name="P63">занесение записей в справочник клиентов <text:span text:style-name="T26">(пользователь вручную или система на основании загружаемых данных)</text:span></text:p>
            </text:list-item>
          </text:list>
        </text:list-item>
        <text:list-item>
          <text:p text:style-name="P60">Загрузка приходно/расходных операций <text:span text:style-name="T27">(через слой STAGE)</text:span></text:p>
        </text:list-item>
        <text:list-item>
          <text:p text:style-name="P60">Формирование <text:span text:style-name="T25">отчётов </text:span><text:span text:style-name="T27">(</text:span><text:span text:style-name="T28">процедура с параметрами, </text:span><text:span text:style-name="T29">результат в витрине</text:span><text:span text:style-name="T27">)</text:span></text:p>
        </text:list-item>
        <text:list-item>
          <text:p text:style-name="P60"><text:span text:style-name="T25">Просмотр отчётов </text:span><text:span text:style-name="T27">(запрос к представлению, </text:span><text:span text:style-name="T29">OLAP</text:span><text:span text:style-name="T27">)</text:span></text:p>
        </text:list-item>
      </text:list>
      <text:h text:style-name="Heading_20_3" text:outline-level="3"><text:bookmark-start text:name="__RefHeading___Toc13836_2642183413"/><text:span text:style-name="T23">4.</text:span><text:span text:style-name="T26">1.2</text:span> <text:span text:style-name="T6">Загрузка данных</text:span><text:bookmark-end text:name="__RefHeading___Toc13836_2642183413"/></text:h>
      <text:p text:style-name="P8">Базовый сценарий загрузки данных:</text:p>
      <text:list xml:id="list2615286058" text:style-name="L9">
        <text:list-item>
          <text:p text:style-name="P64"><text:soft-page-break/>Загрузка через XLS-файл, формат таблицы статичен</text:p>
        </text:list-item>
      </text:list>
      <text:p text:style-name="P8">Варианты загрузки:</text:p>
      <text:list xml:id="list1536793648" text:style-name="L10">
        <text:list-item>
          <text:p text:style-name="P65">Загрузка текущих операций (без контроля баланса)</text:p>
        </text:list-item>
      </text:list>
      <text:p text:style-name="P24">Ограничения этапа MVP: </text:p>
      <text:list xml:id="list2203910531" text:style-name="L11">
        <text:list-item>
          <text:p text:style-name="P61">Установка баланса счёта выполняется при его создании</text:p>
        </text:list-item>
        <text:list-item>
          <text:p text:style-name="P61">Для счёта загрузка операций за период должна быть выполнена в полном объёме (без пропусков)</text:p>
        </text:list-item>
      </text:list>
      <text:h text:style-name="Heading_20_3" text:outline-level="3"><text:bookmark-start text:name="__RefHeading___Toc13842_2642183413"/><text:span text:style-name="T25">4.</text:span><text:span text:style-name="T30">1.3</text:span> Выгрузка отчётов<text:bookmark-end text:name="__RefHeading___Toc13842_2642183413"/></text:h>
      <text:list xml:id="list107014982" text:style-name="L12">
        <text:list-item>
          <text:list>
            <text:list-item>
              <text:list>
                <text:list-header>
                  <text:p text:style-name="P66">Отчёты могут быть сформированы в виде:</text:p>
                </text:list-header>
                <text:list-item>
                  <text:p text:style-name="P66">Таблицы (запрос к витрине, табличная функция):</text:p>
                  <text:list>
                    <text:list-item>
                      <text:p text:style-name="P66">Состояние счетов: состояние счёта на дату</text:p>
                    </text:list-item>
                    <text:list-item>
                      <text:p text:style-name="P66">В разрезе оборота за период</text:p>
                    </text:list-item>
                  </text:list>
                </text:list-item>
                <text:list-item>
                  <text:p text:style-name="P66">В формате аналитического куба</text:p>
                </text:list-item>
              </text:list>
            </text:list-item>
          </text:list>
        </text:list-item>
      </text:list>
      <text:p text:style-name="P29"/>
      <text:h text:style-name="Heading_20_2" text:outline-level="2"><text:bookmark-start text:name="__RefHeading___Toc13856_2642183413"/>4.<text:span text:style-name="T31">2</text:span> <text:span text:style-name="T15">Функциональные требования</text:span><text:bookmark-end text:name="__RefHeading___Toc13856_2642183413"/></text:h>
      <text:list xml:id="list1516017142" text:style-name="L13">
        <text:list-item>
          <text:p text:style-name="P67">БД должна позволять загружать обороты по счёту за период</text:p>
        </text:list-item>
        <text:list-item>
          <text:p text:style-name="P67">БД должна хранить:</text:p>
          <text:list>
            <text:list-item>
              <text:p text:style-name="P67">баланс счёта на конец закрытых периодов</text:p>
            </text:list-item>
            <text:list-item>
              <text:p text:style-name="P67">загруженные проводки (обороты) по счёту</text:p>
            </text:list-item>
          </text:list>
        </text:list-item>
        <text:list-item>
          <text:p text:style-name="P67">БД должна формировать в режиме оперативного расчёта</text:p>
          <text:list>
            <text:list-item>
              <text:p text:style-name="P67">Баланс счёта на заданную дату в пределах текущего расчётного (не закрытого) периода</text:p>
            </text:list-item>
            <text:list-item>
              <text:p text:style-name="P67">Обороты за заданный период (в пределах расчётного, для закрытых периодов обороты зафиксированы и берутся в том виде как хранятся)</text:p>
            </text:list-item>
          </text:list>
        </text:list-item>
        <text:list-item>
          <text:p text:style-name="P67">БД должна иметь возможность предоставить отчёты в форме</text:p>
          <text:list>
            <text:list-item>
              <text:p text:style-name="P67">функций с параметрами, возвращающих табличные значения</text:p>
            </text:list-item>
            <text:list-item>
              <text:p text:style-name="P67">аналитического OLAP-куба</text:p>
            </text:list-item>
          </text:list>
        </text:list-item>
      </text:list>
      <text:p text:style-name="P15"/>
      <text:h text:style-name="Heading_20_2" text:outline-level="2"><text:bookmark-start text:name="__RefHeading___Toc13858_2642183413"/>4.<text:span text:style-name="T31">3</text:span> <text:span text:style-name="T15">НФТ</text:span><text:bookmark-end text:name="__RefHeading___Toc13858_2642183413"/></text:h>
      <text:p text:style-name="Text_20_body"><text:span text:style-name="Strong_20_Emphasis"><text:span text:style-name="T34">Производительность:</text:span></text:span><text:span text:style-name="T32"> </text:span><text:span text:style-name="T33">Время отклика БД на пользовательский запрос не должно превышать 5 секунд.</text:span></text:p>
      <text:p text:style-name="Text_20_body"><text:soft-page-break/><text:span text:style-name="Strong_20_Emphasis"><text:span text:style-name="T34">Масштабируемость:</text:span></text:span><text:span text:style-name="T32"> </text:span><text:span text:style-name="T33">БД не предназначена для многопользовательского режима, требования по масштабируемости на этапе MVP не предъявляются.</text:span></text:p>
      <text:p text:style-name="Text_20_body"><text:span text:style-name="Strong_20_Emphasis"><text:span text:style-name="T34">Надежность и доступность:</text:span></text:span><text:span text:style-name="T32"> </text:span><text:span text:style-name="T33">БД должна</text:span></text:p>
      <text:p text:style-name="Text_20_body"><text:span text:style-name="Strong_20_Emphasis"><text:span text:style-name="T34">Безопасность:</text:span></text:span><text:span text:style-name="T32"> </text:span><text:span text:style-name="T33">БД должна быть пригодна для эксплуатации в закрытом контуре.</text:span></text:p>
      <text:p text:style-name="Text_20_body"><text:span text:style-name="Strong_20_Emphasis"><text:span text:style-name="T34">Совместимость и переносимость:</text:span></text:span><text:span text:style-name="T32"> </text:span><text:span text:style-name="T33">БД функционирует на базе MS SQL Server версии не ниже 2019.</text:span></text:p>
      <text:p text:style-name="Text_20_body"><text:span text:style-name="Strong_20_Emphasis"><text:span text:style-name="T34">Технологические и регуляторные ограничения:</text:span></text:span><text:span text:style-name="T32"> </text:span><text:span text:style-name="T33">БД не предназначена для хранения ПД.</text:span></text:p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irst Last</meta:initial-creator>
    <meta:creation-date>2026-04-30T18:11:07.222961812</meta:creation-date>
    <dc:date>2026-06-02T01:56:42.177777991</dc:date>
    <dc:creator>First Last</dc:creator>
    <meta:editing-duration>P1DT17H24M17S</meta:editing-duration>
    <meta:editing-cycles>62</meta:editing-cycles>
    <meta:generator>LibreOffice/7.3.7.2$Linux_X86_64 LibreOffice_project/30$Build-2</meta:generator>
    <meta:document-statistic meta:table-count="1" meta:image-count="2" meta:object-count="0" meta:page-count="13" meta:paragraph-count="269" meta:word-count="1805" meta:character-count="13115" meta:non-whitespace-character-count="11461"/>
  </office:meta>
</office:document-meta>
</file>