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6000002BC6C4E50FAFF165E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091cm" style:rel-column-width="6288*"/>
    </style:style>
    <style:style style:name="Table1.B" style:family="table-column">
      <style:table-column-properties style:column-width="5.909cm" style:rel-column-width="335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04c50a"/>
    </style:style>
    <style:style style:name="P5" style:family="paragraph" style:parent-style-name="Heading_20_1">
      <style:text-properties officeooo:paragraph-rsid="0004c50a"/>
    </style:style>
    <style:style style:name="P6" style:family="paragraph" style:parent-style-name="Standard">
      <style:paragraph-properties fo:text-align="center" style:justify-single-word="false"/>
      <style:text-properties fo:font-size="16pt" officeooo:rsid="0012e486" officeooo:paragraph-rsid="0004c50a" style:font-size-asian="16pt" style:font-size-complex="16pt"/>
    </style:style>
    <style:style style:name="P7" style:family="paragraph" style:parent-style-name="Table_20_Contents">
      <style:text-properties officeooo:rsid="000a5bec" officeooo:paragraph-rsid="000a5bec"/>
    </style:style>
    <style:style style:name="P8" style:family="paragraph" style:parent-style-name="Text_20_body">
      <style:text-properties officeooo:rsid="00132089" officeooo:paragraph-rsid="0004c50a"/>
    </style:style>
    <style:style style:name="P9" style:family="paragraph" style:parent-style-name="Text_20_body">
      <style:text-properties officeooo:rsid="00147bbc" officeooo:paragraph-rsid="0004c50a"/>
    </style:style>
    <style:style style:name="P10" style:family="paragraph" style:parent-style-name="Text_20_body" style:list-style-name="L10">
      <style:text-properties officeooo:rsid="00147bbc" officeooo:paragraph-rsid="0004c50a"/>
    </style:style>
    <style:style style:name="P11" style:family="paragraph" style:parent-style-name="Text_20_body">
      <style:text-properties officeooo:rsid="00373d64" officeooo:paragraph-rsid="0004c50a"/>
    </style:style>
    <style:style style:name="P12" style:family="paragraph" style:parent-style-name="Text_20_body" style:list-style-name="L10">
      <style:text-properties officeooo:rsid="0004c50a" officeooo:paragraph-rsid="0004c50a"/>
    </style:style>
    <style:style style:name="P13" style:family="paragraph" style:parent-style-name="Text_20_body" style:list-style-name="L1">
      <style:text-properties officeooo:rsid="0004c50a" officeooo:paragraph-rsid="0004c50a"/>
    </style:style>
    <style:style style:name="P14" style:family="paragraph" style:parent-style-name="Text_20_body" style:list-style-name="L1">
      <style:text-properties officeooo:rsid="00059bc1" officeooo:paragraph-rsid="00059bc1"/>
    </style:style>
    <style:style style:name="P15" style:family="paragraph" style:parent-style-name="Text_20_body">
      <style:text-properties officeooo:rsid="0006e927" officeooo:paragraph-rsid="0006e927"/>
    </style:style>
    <style:style style:name="P16" style:family="paragraph" style:parent-style-name="Text_20_body">
      <style:text-properties officeooo:paragraph-rsid="000a5bec"/>
    </style:style>
    <style:style style:name="P17" style:family="paragraph" style:parent-style-name="Text_20_body">
      <style:text-properties officeooo:rsid="000c0d0a" officeooo:paragraph-rsid="000c0d0a"/>
    </style:style>
    <style:style style:name="P18" style:family="paragraph" style:parent-style-name="Text_20_body" style:list-style-name="L11">
      <style:text-properties officeooo:rsid="000c0d0a" officeooo:paragraph-rsid="000c0d0a"/>
    </style:style>
    <style:style style:name="P19" style:family="paragraph" style:parent-style-name="Text_20_body" style:list-style-name="L12">
      <style:text-properties officeooo:rsid="000c0d0a" officeooo:paragraph-rsid="000c0d0a"/>
    </style:style>
    <style:style style:name="P20" style:family="paragraph" style:parent-style-name="Text_20_body" style:list-style-name="L13">
      <style:text-properties officeooo:rsid="000c0d0a" officeooo:paragraph-rsid="000c0d0a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fo:font-size="10pt" fo:font-style="italic" officeooo:rsid="000c0d0a" officeooo:paragraph-rsid="000c0d0a" style:font-size-asian="10pt" style:font-style-asian="italic" style:font-size-complex="10pt" style:font-style-complex="italic"/>
    </style:style>
    <style:style style:name="T1" style:family="text">
      <style:text-properties officeooo:rsid="00132089"/>
    </style:style>
    <style:style style:name="T2" style:family="text">
      <style:text-properties officeooo:rsid="00147bbc"/>
    </style:style>
    <style:style style:name="T3" style:family="text">
      <style:text-properties officeooo:rsid="002e952b"/>
    </style:style>
    <style:style style:name="T4" style:family="text">
      <style:text-properties officeooo:rsid="0004c50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9bc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3ab8a0" style:font-size-asian="16pt" style:font-size-complex="16pt"/>
    </style:style>
    <style:style style:name="T9" style:family="text">
      <style:text-properties fo:font-size="16pt" officeooo:rsid="00059bc1" style:font-size-asian="16pt" style:font-size-complex="16pt"/>
    </style:style>
    <style:style style:name="T10" style:family="text">
      <style:text-properties officeooo:rsid="00089926"/>
    </style:style>
    <style:style style:name="T11" style:family="text">
      <style:text-properties officeooo:rsid="000a5bec"/>
    </style:style>
    <style:style style:name="T12" style:family="text">
      <style:text-properties officeooo:rsid="000c0d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оект по курсу </text:p>
      <text:p text:style-name="P6">MS SQL Server Developer</text:p>
      <text:p text:style-name="P6">Тема: Проектирование БД для управления личными финансами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1"><text:a xlink:type="simple" xlink:href="#__RefHeading___Toc13291_2642183413" text:style-name="Index_20_Link" text:visited-style-name="Index_20_Link">1. Общее описание кейса<text:tab/>3</text:a></text:p>
          <text:p text:style-name="P1"><text:a xlink:type="simple" xlink:href="#__RefHeading___Toc13293_2642183413" text:style-name="Index_20_Link" text:visited-style-name="Index_20_Link">2. Цели и назначение<text:tab/>3</text:a></text:p>
          <text:p text:style-name="P2"><text:a xlink:type="simple" xlink:href="#__RefHeading___Toc13295_2642183413" text:style-name="Index_20_Link" text:visited-style-name="Index_20_Link">2.1 Цели проекта<text:tab/>3</text:a></text:p>
          <text:p text:style-name="P2"><text:a xlink:type="simple" xlink:href="#__RefHeading___Toc13297_2642183413" text:style-name="Index_20_Link" text:visited-style-name="Index_20_Link">2.1. Объём MVP<text:tab/>3</text:a></text:p>
          <text:p text:style-name="P1"><text:a xlink:type="simple" xlink:href="#__RefHeading___Toc13299_2642183413" text:style-name="Index_20_Link" text:visited-style-name="Index_20_Link">3. Характеристики системы<text:tab/>4</text:a></text:p>
          <text:p text:style-name="P2"><text:a xlink:type="simple" xlink:href="#__RefHeading___Toc13301_2642183413" text:style-name="Index_20_Link" text:visited-style-name="Index_20_Link">3.1 Словарь<text:tab/>4</text:a></text:p>
        </text:index-body>
      </text:table-of-content>
      <text:p text:style-name="Text_20_body"/>
      <text:h text:style-name="P4" text:outline-level="1"><text:bookmark-start text:name="__RefHeading___Toc13291_2642183413"/>1. <text:span text:style-name="T1">Общее описание кейса</text:span><text:bookmark-end text:name="__RefHeading___Toc13291_2642183413"/></text:h>
      <text:p text:style-name="P8">Разрабатываемое решение на базе СУБД MS SQL Server <text:span text:style-name="T4">является </text:span>предназначено для управления личными финансами физического лица (ФЛ) — резидента РФ.</text:p>
      <text:p text:style-name="P9">Модель данных опирается на базовые принцип<text:span text:style-name="T4">ы</text:span> бухгалтерского учёта, принятые в РФ, с отдельными допущениями.</text:p>
      <text:p text:style-name="P9"/>
      <text:h text:style-name="P5" text:outline-level="1"><text:bookmark-start text:name="__RefHeading___Toc13293_2642183413"/>2. <text:span text:style-name="T2">Цели и назначение</text:span><text:bookmark-end text:name="__RefHeading___Toc13293_2642183413"/></text:h>
      <text:h text:style-name="Heading_20_2" text:outline-level="2"><text:bookmark-start text:name="__RefHeading___Toc13295_2642183413"/>2.1 <text:span text:style-name="T2">Цели проекта</text:span><text:bookmark-end text:name="__RefHeading___Toc13295_2642183413"/></text:h>
      <text:p text:style-name="P9">Проектирование базы данных выполняется в рамках разработки проекта по созданию системы управления личными финансами.</text:p>
      <text:p text:style-name="P9">Проект ориентирован на создание комплексной системы управления личными финансами.</text:p>
      <text:p text:style-name="P9"><text:span text:style-name="T5">Цель проекта </text:span>— разработка БД для <text:span text:style-name="T3">анализа и </text:span>управления личными финансами.</text:p>
      <text:p text:style-name="P9"><text:span text:style-name="T4">Для понимания роли разрабатываемой базы данных приведём п</text:span>олный скоуп <text:span text:style-name="T4">вышестоящего </text:span>проекта:</text:p>
      <text:list xml:id="list1518926922" text:style-name="L10">
        <text:list-item>
          <text:p text:style-name="P10">Базы данных по направлениям, включая, но не ограничиваясь: </text:p>
          <text:list>
            <text:list-item>
              <text:p text:style-name="P10">учёт и управление операционной деятельностью (повседневные расходы)</text:p>
            </text:list-item>
            <text:list-item>
              <text:p text:style-name="P10">учёт и управление инвестиционной деятельностью (долговременные вложения)</text:p>
            </text:list-item>
            <text:list-item>
              <text:p text:style-name="P10">учёт и управление имуществом (предполагается управление налогооблагаемой имущественной базой)</text:p>
            </text:list-item>
          </text:list>
        </text:list-item>
        <text:list-item>
          <text:p text:style-name="P12">Систему классификации данных</text:p>
        </text:list-item>
        <text:list-item>
          <text:p text:style-name="P10">Систему для анализа и принятия решений.</text:p>
        </text:list-item>
      </text:list>
      <text:p text:style-name="P9">В рамках проекта по курсу MS SQL <text:span text:style-name="T4">будет реализовываться MVP (минимальный работоспособный проект) базы данных с аналитическим инструментом для целей моделирования и оценки концептуальной правильности направления разработки.</text:span></text:p>
      <text:p text:style-name="P8"/>
      <text:h text:style-name="Heading_20_2" text:outline-level="2"><text:bookmark-start text:name="__RefHeading___Toc13297_2642183413"/><text:span text:style-name="T2">2</text:span>.1. Объём MVP<text:bookmark-end text:name="__RefHeading___Toc13297_2642183413"/></text:h>
      <text:p text:style-name="P11">В рамках <text:span text:style-name="T4">MVP </text:span>предполагается реализация:</text:p>
      <text:list xml:id="list4153560270" text:style-name="L1">
        <text:list-item>
          <text:p text:style-name="P13">Хранение данных по счетам (картам с привязанными счетами):</text:p>
          <text:list>
            <text:list-item>
              <text:p text:style-name="P13">баланс на дату</text:p>
            </text:list-item>
            <text:list-item>
              <text:p text:style-name="P13">приходно/расходные операции</text:p>
            </text:list-item>
          </text:list>
        </text:list-item>
        <text:list-item>
          <text:p text:style-name="P14">Детализация данных по:</text:p>
          <text:list>
            <text:list-item>
              <text:p text:style-name="P14">клиентам (вторая сторона приходно/расходной операции)</text:p>
            </text:list-item>
            <text:list-item>
              <text:p text:style-name="P14"><text:soft-page-break/>сделкам (аналитическая сущность для верхнеуровневой агрегации счетов)</text:p>
            </text:list-item>
          </text:list>
        </text:list-item>
        <text:list-item>
          <text:p text:style-name="P14">Пользовательских отчётов (баланс, движение денежных средств) в виде</text:p>
          <text:list>
            <text:list-item>
              <text:p text:style-name="P14">витрин БД</text:p>
            </text:list-item>
            <text:list-item>
              <text:p text:style-name="P14">OLAP-куба на базе витрин</text:p>
            </text:list-item>
          </text:list>
        </text:list-item>
      </text:list>
      <text:h text:style-name="Heading_20_1" text:outline-level="1"><text:bookmark-start text:name="__RefHeading___Toc13299_2642183413"/><text:span text:style-name="T7">3. Характери</text:span><text:span text:style-name="T8">с</text:span><text:span text:style-name="T7">тики </text:span><text:span text:style-name="T9">системы</text:span><text:bookmark-end text:name="__RefHeading___Toc13299_2642183413"/></text:h>
      <text:h text:style-name="Heading_20_2" text:outline-level="2"><text:bookmark-start text:name="__RefHeading___Toc13301_2642183413"/>3.1 <text:span text:style-name="T6">Словарь</text:span><text:bookmark-end text:name="__RefHeading___Toc13301_2642183413"/></text:h>
      <text:p text:style-name="P15">Клиент — вторая сторона сделки (это может быть торговая точка (для торговых операций), банк (например для начисления процентов))</text:p>
      <text:p text:style-name="P15">Договор — агрегат операций (например, покупке в магазине соответствует одна сделка — одна проводка, депозиту в банке соответствует несколько проводок: пополнение счёта, начисление процентов, закрытие счёта…)</text:p>
      <text:p text:style-name="P15">Проводка — денежная операция, одной из сторон которой является владелец БД. Всегда включает в себя 2 стороны.</text:p>
      <text:p text:style-name="P15">Счёт — в общем случае синтетическая сущность, при возможности (например для банковского вклада или уплаты налогов) имеет идентификатор 20-значный принятый в <text:span text:style-name="T10">финансовой системе РФ</text:span>.</text:p>
      <text:p text:style-name="Standard"/>
      <text:p text:style-name="Standard"/>
      <text:h text:style-name="Heading_20_2" text:outline-level="2">3.<text:span text:style-name="T12">2</text:span> <text:span text:style-name="T11">Пользовательские истории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Пользовательская история</text:p>
          </table:table-cell>
          <table:table-cell table:style-name="Table1.B1" office:value-type="string">
            <text:p text:style-name="P7">Сущности</text:p>
          </table:table-cell>
        </table:table-row>
        <table:table-row>
          <table:table-cell table:style-name="Table1.A2" office:value-type="string">
            <text:p text:style-name="P7">Я, как владелец, хочу видеть текущее состояние баланса счетов/карт, чтобы контролировать текущее состояние счетов.</text:p>
          </table:table-cell>
          <table:table-cell table:style-name="Table1.B2" office:value-type="string">
            <text:p text:style-name="P7">Счёт, баланс, отчётная дата</text:p>
          </table:table-cell>
        </table:table-row>
        <table:table-row>
          <table:table-cell table:style-name="Table1.A2" office:value-type="string">
            <text:p text:style-name="P7">Я, как владелец, хочу иметь видеть приходно/расходные операции по счетам/картам, чтобы оценить их правомерность.</text:p>
          </table:table-cell>
          <table:table-cell table:style-name="Table1.B2" office:value-type="string">
            <text:p text:style-name="P7">Счёт (счёт карты), операция (проводка)</text:p>
          </table:table-cell>
        </table:table-row>
        <table:table-row>
          <table:table-cell table:style-name="Table1.A2" office:value-type="string">
            <text:p text:style-name="P7">Я, как пользователь, хочу иметь возможность загружать проводки пулом, чтобы снизить затраты времени на учётные операции.</text:p>
          </table:table-cell>
          <table:table-cell table:style-name="Table1.B2" office:value-type="string">
            <text:p text:style-name="P7">Проводка, набор проводок, операция загрузки</text:p>
          </table:table-cell>
        </table:table-row>
        <table:table-row>
          <table:table-cell table:style-name="Table1.A2" office:value-type="string">
            <text:p text:style-name="P7">Я, как владелец, хочу иметь возможность табличной выгрузки данных, чтобы контролировать каждую операцию.</text:p>
          </table:table-cell>
          <table:table-cell table:style-name="Table1.B2" office:value-type="string">
            <text:p text:style-name="P7">Отчёт, операция (проводка)</text:p>
          </table:table-cell>
        </table:table-row>
        <table:table-row>
          <table:table-cell table:style-name="Table1.A2" office:value-type="string">
            <text:p text:style-name="P7">Я, как владелец, хочу иметь возможность настройки периода просматриваемых отчётов, чтобы проводить анализ разсходов.</text:p>
          </table:table-cell>
          <table:table-cell table:style-name="Table1.B2" office:value-type="string">
            <text:p text:style-name="P7">Календарный период, баланс</text:p>
          </table:table-cell>
        </table:table-row>
      </table:table>
      <text:p text:style-name="P16"/>
      <text:h text:style-name="Heading_20_2" text:outline-level="2"><text:soft-page-break/>3.3 <text:span text:style-name="T12">Описание предметной области</text:span></text:h>
      <text:p text:style-name="P17">База данных обеспечивает следующие операции:</text:p>
      <text:list xml:id="list2349955715" text:style-name="L11">
        <text:list-item>
          <text:p text:style-name="P18">Загрузку данных:</text:p>
          <text:list>
            <text:list-item>
              <text:p text:style-name="P18">О состоянии счёта (загрузка, обновление/уточнение)</text:p>
            </text:list-item>
            <text:list-item>
              <text:p text:style-name="P18">Операциях по счёту</text:p>
            </text:list-item>
          </text:list>
        </text:list-item>
        <text:list-item>
          <text:p text:style-name="P18">Хранение данных</text:p>
          <text:list>
            <text:list-item>
              <text:p text:style-name="P18">Данных о счёте (владелец, тип счёта)</text:p>
            </text:list-item>
            <text:list-item>
              <text:p text:style-name="P18">Операций по счёту (в значении бухгалтерских проводок)</text:p>
            </text:list-item>
            <text:list-item>
              <text:p text:style-name="P18">Состояния (баланса) счёта на дату</text:p>
            </text:list-item>
          </text:list>
        </text:list-item>
        <text:list-item>
          <text:p text:style-name="P18">Формирование отчётов:</text:p>
          <text:list>
            <text:list-item>
              <text:p text:style-name="P18">О состоянии счёта на конкретную дату</text:p>
            </text:list-item>
            <text:list-item>
              <text:p text:style-name="P18">о прибылях и убытках (баланс приходно/расходных операций на этапе MVP) за заданный период</text:p>
            </text:list-item>
          </text:list>
        </text:list-item>
        <text:list-item>
          <text:p text:style-name="P18">Представление отчётов в аналитической системе (OLAP-куб)</text:p>
        </text:list-item>
      </text:list>
      <text:p text:style-name="P17">База данных обеспечивает следующие технологические операции:</text:p>
      <text:list xml:id="list4261929092" text:style-name="L12">
        <text:list-item>
          <text:p text:style-name="P19">Валидацию входящих данных в соответствии с заданными параметрами (на этапе MVP: консистентность данных, соответствие типов)</text:p>
        </text:list-item>
        <text:list-item>
          <text:p text:style-name="P19">Расчёт баланса на дату</text:p>
        </text:list-item>
        <text:list-item>
          <text:p text:style-name="P19">Формирование и хранение отчётов</text:p>
        </text:list-item>
      </text:list>
      <text:p text:style-name="P17">Для пользователя БД должны быть доступны операции:</text:p>
      <text:list xml:id="list82239917" text:style-name="L13">
        <text:list-item>
          <text:p text:style-name="P20">Загрузка данных из XLS-файла за период</text:p>
        </text:list-item>
        <text:list-item>
          <text:p text:style-name="P20">Просмотр отчётов (BS, PL)</text:p>
        </text:list-item>
        <text:list-item>
          <text:p text:style-name="P20">Выгрузка ОПУ за период</text:p>
        </text:list-item>
        <text:list-item>
          <text:p text:style-name="P20">Выгрузка баланса на дату</text:p>
        </text:list-item>
        <text:list-item>
          <text:p text:style-name="P20">Выгрузка справочников (клиенты, договоры, счета)</text:p>
        </text:list-item>
      </text:list>
      <text:h text:style-name="Heading_20_2" text:outline-level="2">3.4 <text:span text:style-name="T12">ER-диаграмма</text:span></text:h>
      <text:p text:style-name="P17">На этапе MVP ER-диаграмму можно представить в следующем виде:</text:p>
      <text:p text:style-name="P17"/>
      <text:p text:style-name="P17"><draw:frame draw:style-name="fr1" draw:name="Image1" text:anchor-type="char" svg:width="17cm" svg:height="9.253cm" draw:z-index="0"><draw:image xlink:href="Pictures/1000000000000506000002BC6C4E50FAFF165EFB.png" xlink:type="simple" xlink:show="embed" xlink:actuate="onLoad" draw:mime-type="image/png"/></draw:frame><text:soft-page-break/>Текст диграммы в формате plantUML:</text:p>
      <text:p text:style-name="P21">@startuml</text:p>
      <text:p text:style-name="P21">'Диаграмма ERD MVP-проекта</text:p>
      <text:p text:style-name="P21">' v.1.2</text:p>
      <text:p text:style-name="P21">'left to right direction</text:p>
      <text:p text:style-name="P21">' Скрытие теней и кружков</text:p>
      <text:p text:style-name="P21">hide circle</text:p>
      <text:p text:style-name="P21">hide spot</text:p>
      <text:p text:style-name="P21"/>
      <text:p text:style-name="P21">'Определение сущностей</text:p>
      <text:p text:style-name="P21">'Счёт, всегда на 1 клиента, второй - владелец базы</text:p>
      <text:p text:style-name="P21">'Номер счёта 20-значник, может быть синтетический</text:p>
      <text:p text:style-name="P21">Entity DIC_ACCOUNT{</text:p>
      <text:p text:style-name="P21"><text:s text:c="4"/>* id_account : int &lt;&lt;PK&gt;&gt;</text:p>
      <text:p text:style-name="P21">--</text:p>
      <text:p text:style-name="P21"><text:s text:c="4"/>* account_name : varchar(20)</text:p>
      <text:p text:style-name="P21"><text:s text:c="4"/>* id_client : int</text:p>
      <text:p text:style-name="P21"><text:s text:c="4"/>* accunt_description: varchar(512)</text:p>
      <text:p text:style-name="P21"><text:s text:c="4"/>* id_bal2 : int &lt;&lt;FK&gt;&gt;</text:p>
      <text:p text:style-name="P21"><text:s text:c="4"/>* valid_to : date</text:p>
      <text:p text:style-name="P21">}</text:p>
      <text:p text:style-name="P21"/>
      <text:p text:style-name="P21"/>
      <text:p text:style-name="P21">'Клиент (справочник)</text:p>
      <text:p text:style-name="P21">Entity DIC_CLIENT</text:p>
      <text:p text:style-name="P21">{</text:p>
      <text:p text:style-name="P21"><text:s text:c="4"/>* id_client : INT &lt;&lt;PK&gt;&gt;</text:p>
      <text:p text:style-name="P21">--</text:p>
      <text:p text:style-name="P21"><text:s text:c="4"/>* client_name : varchar(512)</text:p>
      <text:p text:style-name="P21"><text:s text:c="4"/>* create_date : date</text:p>
      <text:p text:style-name="P21"><text:s text:c="4"/>* valid: to : date</text:p>
      <text:p text:style-name="P21"><text:s text:c="4"/>* is_del : BOOL</text:p>
      <text:p text:style-name="P21">}</text:p>
      <text:p text:style-name="P21"/>
      <text:p text:style-name="P21">'Договор (справочник)</text:p>
      <text:p text:style-name="P21">Entity DIC_AGREEMENT</text:p>
      <text:p text:style-name="P21">{</text:p>
      <text:p text:style-name="P21"><text:s text:c="4"/>* id_agreement : INT &lt;&lt;PK&gt;&gt;</text:p>
      <text:p text:style-name="P21">--</text:p>
      <text:p text:style-name="P21"><text:soft-page-break/><text:s text:c="4"/>* agreement_name : varchar(512)</text:p>
      <text:p text:style-name="P21"><text:s text:c="4"/>* create_date : date</text:p>
      <text:p text:style-name="P21"><text:s text:c="4"/>* valid: to : date</text:p>
      <text:p text:style-name="P21"><text:s text:c="4"/>* is_del : BOOL</text:p>
      <text:p text:style-name="P21">}</text:p>
      <text:p text:style-name="P21"/>
      <text:p text:style-name="P21">'Проводка (основной поток данных, все поля обязательные)</text:p>
      <text:p text:style-name="P21">Entity FCT_CARRY</text:p>
      <text:p text:style-name="P21">{</text:p>
      <text:p text:style-name="P21"><text:s text:c="4"/>* id_CARRY : INT &lt;&lt;PK&gt;&gt;</text:p>
      <text:p text:style-name="P21"><text:s text:c="2"/>--</text:p>
      <text:p text:style-name="P21"><text:s text:c="4"/>* carry_date : DATE</text:p>
      <text:p text:style-name="P21">'описание проводки</text:p>
      <text:p text:style-name="P21"><text:s text:c="4"/>* description : varchar(512)</text:p>
      <text:p text:style-name="P21"><text:s text:c="4"/>* id_account_dbt : int &lt;&lt;FK&gt;&gt;</text:p>
      <text:p text:style-name="P21"><text:s text:c="4"/>* id_account_crd : int &lt;&lt;FK&gt;&gt;</text:p>
      <text:p text:style-name="P21"><text:s text:c="4"/>* id_agreement : int &lt;&lt;FK&gt;&gt;</text:p>
      <text:p text:style-name="P21"><text:s text:c="4"/>* VL : float</text:p>
      <text:p text:style-name="P21"><text:s text:c="4"/>* transaction_way : int &lt;&lt;FK&gt;&gt;</text:p>
      <text:p text:style-name="P21">'дата создания проводки</text:p>
      <text:p text:style-name="P21"><text:s text:c="4"/>* SRC_date : datetime</text:p>
      <text:p text:style-name="P21">'пользователь создавший проводку</text:p>
      <text:p text:style-name="P21">' <text:s text:c="3"/>* SRC_user : int &lt;&lt;FK&gt;&gt;</text:p>
      <text:p text:style-name="P21">'основание для создания проводки (из справочника)'</text:p>
      <text:p text:style-name="P21">' <text:s text:c="3"/>* carry_ground : int &lt;&lt;FK&gt;&gt;</text:p>
      <text:p text:style-name="P21">}</text:p>
      <text:p text:style-name="P21"/>
      <text:p text:style-name="P21">'Остаток на дату (таблица заполняемая расчётными процедурами)</text:p>
      <text:p text:style-name="P21">Entity DM_REST</text:p>
      <text:p text:style-name="P21">{</text:p>
      <text:p text:style-name="P21"><text:s text:c="4"/>* id_date : date</text:p>
      <text:p text:style-name="P21"><text:s text:c="4"/>* id_account : int &lt;&lt;FK&gt;&gt;</text:p>
      <text:p text:style-name="P21"><text:s text:c="4"/>* value : float</text:p>
      <text:p text:style-name="P21">}</text:p>
      <text:p text:style-name="P21"/>
      <text:p text:style-name="P21">'Классификаторы</text:p>
      <text:p text:style-name="P21">'Справочник балансовых счетов, версионный</text:p>
      <text:p text:style-name="P21">Entity DIC_BAL2</text:p>
      <text:p text:style-name="P21">{</text:p>
      <text:p text:style-name="P21"><text:s text:c="4"/>* id_bal2 : int &lt;&lt;PK&gt;&gt;</text:p>
      <text:p text:style-name="P21"><text:s text:c="4"/>* description : varchar(512)</text:p>
      <text:p text:style-name="P21"><text:s text:c="4"/>* id_bal2_parent : int</text:p>
      <text:p text:style-name="P21"><text:s text:c="4"/>* valid_to : date</text:p>
      <text:p text:style-name="P21"><text:s text:c="4"/>* id_del : BOOL</text:p>
      <text:p text:style-name="P21"><text:s text:c="4"/>* id_bal2_version : int &lt;&lt;FK&gt;&gt;</text:p>
      <text:p text:style-name="P21">}</text:p>
      <text:p text:style-name="P21"/>
      <text:p text:style-name="P21">'версии справочника (например разные планы счетов)</text:p>
      <text:p text:style-name="P21">Entity DIC_BAL2_VERSION</text:p>
      <text:p text:style-name="P21">{</text:p>
      <text:p text:style-name="P21"><text:s text:c="4"/>* id_bal2_version : int &lt;&lt;PK&gt;&gt;</text:p>
      <text:p text:style-name="P21"><text:s text:c="4"/>* version_name : varchar(1024)</text:p>
      <text:p text:style-name="P21"><text:s text:c="4"/>* is_del : BOOL</text:p>
      <text:p text:style-name="P21">}</text:p>
      <text:p text:style-name="P21"/>
      <text:p text:style-name="P21"/>
      <text:p text:style-name="P21">'Статьи баланса (для отчётов)</text:p>
      <text:p text:style-name="P21">'Статьи ОПУ (для отчётов)</text:p>
      <text:p text:style-name="P21">'Балансовые счета (для классификаторов)</text:p>
      <text:p text:style-name="P21"/>
      <text:p text:style-name="P21">'------------------Связи</text:p>
      <text:p text:style-name="P21">'Клиент - договор, счёт</text:p>
      <text:p text:style-name="P21">DIC_CLIENT ||-left-|{ DIC_ACCOUNT : владеет счётом (1:N)</text:p>
      <text:p text:style-name="P21"><text:soft-page-break/>'второй стороной договора всегда рассматривается владелец базы для которого она ведётся</text:p>
      <text:p text:style-name="P21">DIC_CLIENT ||--|{ DIC_AGREEMENT : договор заключен с (1:N)</text:p>
      <text:p text:style-name="P21"/>
      <text:p text:style-name="P21">'Проводка - счёт (движение между счетами)</text:p>
      <text:p text:style-name="P21">DIC_ACCOUNT ||-down-|{ FCT_CARRY : проводке нужны 2 счёта (1:2)</text:p>
      <text:p text:style-name="P21">DIC_BAL2 ||-|{ DIC_ACCOUNT : каждый счёт классифицирован</text:p>
      <text:p text:style-name="P21"/>
      <text:p text:style-name="P21">DIC_BAL2_VERSION ||-down-|{ DIC_BAL2 : каждый счёт в каком-то справочнике</text:p>
      <text:p text:style-name="P21"/>
      <text:p text:style-name="P21">DIC_AGREEMENT ||-left-|{ FCT_CARRY : договор обслуживается (1:N)</text:p>
      <text:p text:style-name="P21"/>
      <text:p text:style-name="P21">'Остаток на дату - счёт (историческая таблица)</text:p>
      <text:p text:style-name="P21">DIC_ACCOUNT ||-up-|{ DM_REST</text:p>
      <text:p text:style-name="P21"/>
      <text:p text:style-name="P21"/>
      <text:p text:style-name="P21"/>
      <text:p text:style-name="P21">@endu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1T20:51:55.330832389</dc:date>
    <dc:creator>First Last</dc:creator>
    <meta:editing-duration>PT1H27M27S</meta:editing-duration>
    <meta:editing-cycles>6</meta:editing-cycles>
    <meta:generator>LibreOffice/7.3.7.2$Linux_X86_64 LibreOffice_project/30$Build-2</meta:generator>
    <meta:document-statistic meta:table-count="1" meta:image-count="1" meta:object-count="0" meta:page-count="8" meta:paragraph-count="182" meta:word-count="980" meta:character-count="6935" meta:non-whitespace-character-count="6008"/>
  </office:meta>
</office:document-meta>
</file>